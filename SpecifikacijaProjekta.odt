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14B8D8A74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07f5" officeooo:paragraph-rsid="001b07f5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b07f5" officeooo:paragraph-rsid="001b07f5"/>
    </style:style>
    <style:style style:name="P3" style:family="paragraph" style:parent-style-name="Standard">
      <style:text-properties fo:font-size="16pt" fo:font-weight="bold" officeooo:rsid="001b07f5" officeooo:paragraph-rsid="001b07f5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07f5" officeooo:paragraph-rsid="001c9395"/>
    </style:style>
    <style:style style:name="P5" style:family="paragraph" style:parent-style-name="Standard">
      <style:text-properties fo:language="en" fo:country="US" officeooo:rsid="001b07f5" officeooo:paragraph-rsid="001c9395"/>
    </style:style>
    <style:style style:name="P6" style:family="paragraph" style:parent-style-name="Standard">
      <style:text-properties fo:language="en" fo:country="US" officeooo:rsid="001b07f5" officeooo:paragraph-rsid="001b07f5"/>
    </style:style>
    <style:style style:name="P7" style:family="paragraph" style:parent-style-name="Standard">
      <style:text-properties fo:font-size="16pt" fo:language="en" fo:country="US" fo:font-weight="bold" officeooo:rsid="001c9395" officeooo:paragraph-rsid="001c9395" style:font-size-asian="16pt" style:font-weight-asian="bold" style:font-size-complex="16pt" style:font-weight-complex="bold"/>
    </style:style>
    <style:style style:name="P8" style:family="paragraph" style:parent-style-name="Standard">
      <style:text-properties fo:language="en" fo:country="US" officeooo:rsid="001c9395" officeooo:paragraph-rsid="001c9395"/>
    </style:style>
    <style:style style:name="P9" style:family="paragraph" style:parent-style-name="Standard">
      <style:text-properties fo:font-size="18pt" fo:language="en" fo:country="US" officeooo:rsid="001c9395" officeooo:paragraph-rsid="001c9395" style:font-size-asian="18pt" style:font-size-complex="18pt"/>
    </style:style>
    <style:style style:name="P10" style:family="paragraph" style:parent-style-name="Standard">
      <style:text-properties officeooo:paragraph-rsid="001c9395"/>
    </style:style>
    <style:style style:name="P11" style:family="paragraph" style:parent-style-name="Standard">
      <style:text-properties fo:font-size="14pt" fo:language="en" fo:country="US" fo:font-weight="bold" officeooo:rsid="00230b65" officeooo:paragraph-rsid="00230b6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rsid="00230b65" officeooo:paragraph-rsid="00230b65"/>
    </style:style>
    <style:style style:name="P13" style:family="paragraph" style:parent-style-name="Standard">
      <style:text-properties fo:font-size="18pt" fo:language="en" fo:country="US" style:text-underline-style="solid" style:text-underline-width="auto" style:text-underline-color="font-color" officeooo:rsid="001f8632" officeooo:paragraph-rsid="001f8632" style:font-size-asian="18pt" style:font-size-complex="18pt"/>
    </style:style>
    <style:style style:name="P14" style:family="paragraph" style:parent-style-name="Standard">
      <style:text-properties fo:font-size="18pt" fo:language="en" fo:country="US" style:text-underline-style="none" officeooo:rsid="0020f7f3" officeooo:paragraph-rsid="001f8632" style:font-size-asian="18pt" style:font-size-complex="18pt"/>
    </style:style>
    <style:style style:name="P15" style:family="paragraph" style:parent-style-name="Standard">
      <style:text-properties fo:font-size="18pt" fo:language="en" fo:country="US" style:text-underline-style="none" officeooo:rsid="0020f7f3" officeooo:paragraph-rsid="00222e20" style:font-size-asian="18pt" style:font-size-complex="18pt"/>
    </style:style>
    <style:style style:name="P16" style:family="paragraph" style:parent-style-name="Standard">
      <style:text-properties fo:font-size="14pt" fo:language="en" fo:country="US" style:text-underline-style="none" officeooo:rsid="00222e20" officeooo:paragraph-rsid="00222e20" style:font-size-asian="14pt" style:font-size-complex="14pt"/>
    </style:style>
    <style:style style:name="P17" style:family="paragraph" style:parent-style-name="Standard">
      <style:text-properties fo:font-size="14pt" fo:language="en" fo:country="US" style:text-underline-style="none" officeooo:rsid="0020f7f3" officeooo:paragraph-rsid="001f8632" style:font-size-asian="14pt" style:font-size-complex="14pt"/>
    </style:style>
    <style:style style:name="P18" style:family="paragraph" style:parent-style-name="Standard">
      <style:text-properties fo:font-size="14pt" style:text-underline-style="none" officeooo:rsid="0020f7f3" officeooo:paragraph-rsid="001f8632" style:font-size-asian="14pt" style:font-size-complex="14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20f7f3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20f7f3" officeooo:paragraph-rsid="0024fb0b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officeooo:rsid="0020f7f3" officeooo:paragraph-rsid="0024fb0b" style:text-blinking="false" fo:background-color="transparent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20f7f3" officeooo:paragraph-rsid="0025de39" style:text-blinking="false" fo:background-color="transparent" style:font-size-asian="14pt" style:font-size-complex="14p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officeooo:rsid="0020f7f3" style:text-blinking="false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en" fo:country="US" style:text-underline-style="none" officeooo:rsid="0020f7f3" officeooo:paragraph-rsid="0024fb0b" style:font-size-asian="14pt" style:font-size-complex="14pt"/>
    </style:style>
    <style:style style:name="P25" style:family="paragraph" style:parent-style-name="Standard">
      <style:text-properties fo:language="en" fo:country="US" officeooo:rsid="00276463" officeooo:paragraph-rsid="0027646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language="en" fo:country="US"/>
    </style:style>
    <style:style style:name="T3" style:family="text">
      <style:text-properties officeooo:rsid="001c9395"/>
    </style:style>
    <style:style style:name="T4" style:family="text">
      <style:text-properties officeooo:rsid="00276463"/>
    </style:style>
    <style:style style:name="T5" style:family="text">
      <style:text-properties style:text-underline-style="solid" style:text-underline-width="auto" style:text-underline-color="font-color" officeooo:rsid="001f863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 officeooo:rsid="001c939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officeooo:rsid="001f8632" style:font-weight-asian="bold" style:font-weight-complex="bold"/>
    </style:style>
    <style:style style:name="T13" style:family="text">
      <style:text-properties fo:font-weight="bold" officeooo:rsid="001e809f" style:font-weight-asian="bold" style:font-weight-complex="bold"/>
    </style:style>
    <style:style style:name="T14" style:family="text">
      <style:text-properties officeooo:rsid="001e809f"/>
    </style:style>
    <style:style style:name="T15" style:family="text">
      <style:text-properties fo:font-style="italic" officeooo:rsid="001e809f" style:font-style-asian="italic" style:font-style-complex="italic"/>
    </style:style>
    <style:style style:name="T16" style:family="text">
      <style:text-properties fo:font-style="italic" officeooo:rsid="001f8632" style:font-style-asian="italic" style:font-style-complex="italic"/>
    </style:style>
    <style:style style:name="T17" style:family="text">
      <style:text-properties fo:font-style="italic" officeooo:rsid="00244cf8" style:font-style-asian="italic" style:font-style-complex="italic"/>
    </style:style>
    <style:style style:name="T18" style:family="text">
      <style:text-properties officeooo:rsid="001f8632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fo:font-weight="bold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fo:font-weight="normal" style:text-blinking="false" fo:background-color="transparent" loext:char-shading-value="0"/>
    </style:style>
    <style:style style:name="T24" style:family="text">
      <style:text-properties officeooo:rsid="0025de39"/>
    </style:style>
    <style:style style:name="T25" style:family="text">
      <style:text-properties officeooo:rsid="00274c6f"/>
    </style:style>
    <style:style style:name="T26" style:family="text">
      <style:text-properties fo:language="en" fo:country="US" officeooo:rsid="0024fb0b"/>
    </style:style>
    <style:style style:name="T27" style:family="text">
      <style:text-properties fo:font-size="12pt" officeooo:rsid="0024fb0b" style:font-size-asian="10.5pt" style:font-size-complex="12pt"/>
    </style:style>
    <style:style style:name="T28" style:family="text">
      <style:text-properties officeooo:rsid="0024fb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log Projekta Softverski Agenti skolska 2025/2026</text:p>
      <text:p text:style-name="P2"/>
      <text:p text:style-name="P3">Tim</text:p>
      <text:p text:style-name="P4"><text:tab/>Nikola Petkovi<text:span text:style-name="T1">ć </text:span></text:p>
      <text:p text:style-name="P4"><text:span text:style-name="T1"><text:tab/>RA <text:s/></text:span><text:span text:style-name="T2">232/2015 </text:span></text:p>
      <text:p text:style-name="P5"><text:tab/><text:span text:style-name="T3">nikola.petkovic220@gmail.com</text:span></text:p>
      <text:p text:style-name="P6"/>
      <text:p text:style-name="P6"/>
      <text:p text:style-name="P7">Specifikacija <text:span text:style-name="T4">(Radio bih je za 9 ili 10 ako uspem)</text:span>:</text:p>
      <text:p text:style-name="P8"><text:tab/></text:p>
      <text:p text:style-name="P9"><text:s/><text:span text:style-name="T5">* </text:span><text:span text:style-name="T6">Aktorski radni okvir;</text:span></text:p>
      <text:p text:style-name="P8"/>
      <text:p text:style-name="P10"><text:span text:style-name="T7"><text:tab/>- </text:span><text:bookmark text:name="docs-internal-guid-b2390e54-7fff-f3a7-ff8e-26f8e50db1bf"/><text:span text:style-name="T8">Obavezni elementi</text:span><text:span text:style-name="T9">: </text:span><text:span text:style-name="T10">Aktori, Asinhrono slanje i primanje poruka, Sanduče, Menjanje ponašanja (stanja) aktora, Reagovanje na lifecycle događaje stvaranja i otkazivanja aktora, Udaljena komunikacija aktora</text:span><text:span text:style-name="T11"> </text:span></text:p>
      <text:p text:style-name="P8"><text:tab/>- <text:span text:style-name="T12">D</text:span><text:span text:style-name="T13">odatne funkcionalnosti</text:span><text:span text:style-name="T14">: </text:span><text:span text:style-name="T15">actor supervision, </text:span><text:span text:style-name="T16">middleware, </text:span><text:span text:style-name="T17">crdt</text:span></text:p>
      <text:p text:style-name="P8"><text:tab/>-<text:span text:style-name="T18">Demo</text:span></text:p>
      <text:p text:style-name="P8"/>
      <text:p text:style-name="P11"/>
      <text:p text:style-name="P12"><text:span text:style-name="T19">Aktori</text:span>: (povuceni iz starog projekta, bice sigurnih prepravki <text:s/>)</text:p>
      <text:p text:style-name="P12"><text:tab/></text:p>
      <text:p text:style-name="P12"><text:tab/><text:span text:style-name="T20">StateManagment</text:span> Actor - Pokrece sve retail aktore da dobavi stanje svih proizoda i kesira ih.</text:p>
      <text:p text:style-name="P12">(Proizvod bi imao samo naziv i ukupno stanje u svim bazama)</text:p>
      <text:p text:style-name="P12"/>
      <text:p text:style-name="P12"><text:tab/><text:span text:style-name="T20">Distributor</text:span> <text:span text:style-name="T20">Actor</text:span> – poziva retailer aktore redom po najblizoj distanci od kupca i trazi zadate</text:p>
      <text:p text:style-name="P12">proizvode. Prima poruke od retailra i vrsi kalkulacije da li da nabavi nove proizovde ili da ih</text:p>
      <text:p text:style-name="P12">premesti iz skladista u skladiste.</text:p>
      <text:p text:style-name="P12"/>
      <text:p text:style-name="P12"><text:tab/><text:span text:style-name="T20">Retailer</text:span> <text:span text:style-name="T20">Actor</text:span> – komunicira sa svojom bazom i proverava njeno stanje, po potrebi moze poslati</text:p>
      <text:p text:style-name="P12">distributeru zahtev za obnvaljanje svojih zaliha. Takodje proverava stanje potrebnih proizvoda</text:p>
      <text:p text:style-name="P12">na zahtev distributera.</text:p>
      <text:p text:style-name="P12"/>
      <text:p text:style-name="P12"><text:tab/><text:span text:style-name="T20">Suplier</text:span> <text:span text:style-name="T20">Actor</text:span> - Prima porudzbine od distrbutera i prosledjuje ih u potrebna skladista.</text:p>
      <text:p text:style-name="P12"/>
      <text:p text:style-name="P12"><text:tab/><text:span text:style-name="T20">Kupac</text:span> - inicira komunikaciju sa distributerom po zahtevu korisnika .</text:p>
      <text:p text:style-name="P12"><draw:frame draw:style-name="fr1" draw:name="Image1" text:anchor-type="char" svg:width="6.7091in" svg:height="3.448in" draw:z-index="0"><draw:image xlink:href="Pictures/10000001000002840000014B8D8A7455.png" xlink:type="simple" xlink:show="embed" xlink:actuate="onLoad" draw:mime-type="image/png"/></draw:frame><text:soft-page-break/></text:p>
      <text:p text:style-name="P8"/>
      <text:p text:style-name="P13">* Federativno ucenje</text:p>
      <text:p text:style-name="P14"/>
      <text:p text:style-name="P15"><text:span text:style-name="T21">Problem koji se resava: </text:span></text:p>
      <text:p text:style-name="P16"><text:tab/><text:tab/>Predikcija naredne reci prilikom unosa teksta na mobilnom telefonu.</text:p>
      <text:p text:style-name="P16"/>
      <text:p text:style-name="P17"/>
      <text:p text:style-name="P18"><text:bookmark text:name="docs-internal-guid-99707e90-7fff-80c5-f976-07de4a161a1e"/><text:span text:style-name="T22">-</text:span><text:span text:style-name="T23"> </text:span><text:span text:style-name="T22">Specifikacija algoritma koji će biti implementiran</text:span></text:p>
      <text:p text:style-name="P19"><text:tab/><text:span text:style-name="T24">lokalni model cuvati u G-vector crdt </text:span><text:span text:style-name="T25">sa oslanjnajnem na gossip kako bi razmenili tezine</text:span><text:span text:style-name="T24"> </text:span></text:p>
      <text:p text:style-name="P19"><text:span text:style-name="T20">- Skup podataka</text:span>:</text:p>
      <text:p text:style-name="P19"><text:tab/>https://github.com/linanqiu/reddit-dataset/</text:p>
      <text:p text:style-name="P20"><text:tab/><text:span text:style-name="T26">Grupisati skup podataka po korisnicima I sortirati prema vremenu</text:span></text:p>
      <text:p text:style-name="P21">- Način distribucije treniranja algoritma:</text:p>
      <text:p text:style-name="P22"><text:tab/><text:span text:style-name="T24">Decentralizovano, </text:span><text:span text:style-name="T4">cvor razmenjuje tezine samo sa poznatim cvorovima</text:span></text:p>
      <text:p text:style-name="P23">- Metod evaluacije rezultata:</text:p>
      <text:p text:style-name="P24"><text:tab/><text:span text:style-name="T27">Preseci skup podataka u nekom momentu I korisitit novije podatke kao test. </text:span><text:span text:style-name="T28"><text:s/></text:span></text:p>
      <text:p text:style-name="P8"/>
      <text:p text:style-name="P8"/>
      <text:p text:style-name="P25">P.S. <text:span text:style-name="T20">Nemam iskustva sa</text:span> federativnim ucenjem pa sam se oslonio na LLM za specifikacij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2:11:04.937896700</meta:creation-date>
    <dc:date>2026-05-31T23:33:09.254332100</dc:date>
    <meta:editing-duration>PT13M9S</meta:editing-duration>
    <meta:editing-cycles>1</meta:editing-cycles>
    <meta:document-statistic meta:table-count="0" meta:image-count="1" meta:object-count="0" meta:page-count="2" meta:paragraph-count="36" meta:word-count="274" meta:character-count="1953" meta:non-whitespace-character-count="1681"/>
    <meta:generator>LibreOffice/25.2.7.2$Windows_X86_64 LibreOffice_project/5cbfd1ab6520636bb5f7b99185aa69bd7456825d</meta:generator>
  </office:meta>
</office:document-meta>
</file>